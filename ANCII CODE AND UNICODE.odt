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CA"/>
    </style:style>
    <style:style style:name="T2" style:parent-style-name="DefaultParagraphFont" style:family="text">
      <style:text-properties fo:font-style="italic" style:font-style-asian="italic" style:font-style-complex="italic"/>
    </style:style>
    <style:style style:name="P3" style:parent-style-name="Normal" style:family="paragraph">
      <style:paragraph-properties fo:break-before="page"/>
    </style:style>
    <style:style style:name="P4" style:parent-style-name="Normal" style:family="paragraph">
      <style:text-properties fo:language="en" fo:country="CA"/>
    </style:style>
    <style:style style:name="P5" style:parent-style-name="Normal" style:family="paragraph">
      <style:paragraph-properties fo:break-before="page"/>
    </style:style>
    <style:style style:name="T6" style:parent-style-name="Hyperlink" style:family="text">
      <style:text-properties fo:language="en" fo:country="CA"/>
    </style:style>
    <style:style style:name="T7" style:parent-style-name="Hyperlink" style:family="text">
      <style:text-properties fo:language="en" fo:country="CA"/>
    </style:style>
    <style:style style:name="T8" style:parent-style-name="Hyperlink" style:family="text">
      <style:text-properties fo:language="en" fo:country="CA"/>
    </style:style>
    <style:style style:name="T9" style:parent-style-name="DefaultParagraphFont" style:family="text">
      <style:text-properties fo:language="en" fo:country="CA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NSCI CODE<text:s/></text:p>
      <text:p text:style-name="Normal">ASCII (American Standard Code for Information Interchange) is the most common<text:s/>character encoding<text:s/> format for text data in computers and on the internet. In standard ASCII-encoded data, there are unique values for 128 alphabetic, numeric or special additional characters and control codes. Over the years, several ASCII <text:span text:style-name="T2">extended sets</text:span> have emerged that expand the original set of 128 characters with additional symbols and characters.</text:p>
      <text:p text:style-name="Normal"/>
      <text:p text:style-name="Normal"><draw:frame draw:style-name="a0" draw:name="Picture 1" text:anchor-type="as-char" svg:x="0in" svg:y="0in" svg:width="4.89583in" svg:height="5.79167in" style:rel-width="scale" style:rel-height="scale"><draw:image xlink:href="media/image1.gif" xlink:type="simple" xlink:show="embed" xlink:actuate="onLoad"/><svg:title/><svg:desc>ASCII (American Standard Code for Information Interchange) - AllBusiness.com</svg:desc></draw:frame></text:p>
      <text:p text:style-name="P3"/>
      <text:soft-page-break/>
      <text:p text:style-name="P4">UNICODE<text:s/></text:p>
      <text:p text:style-name="Normal">Unicode is an international character encoding standard that provides a unique number for every character across languages and scripts, making almost all characters accessible across platforms, programs, and devices.</text:p>
      <text:p text:style-name="Normal"><draw:frame draw:style-name="a1" draw:name="Picture 2" text:anchor-type="as-char" svg:x="0in" svg:y="0in" svg:width="6.10417in" svg:height="6.2625in" style:rel-width="scale" style:rel-height="scale"><draw:image xlink:href="media/image2.png" xlink:type="simple" xlink:show="embed" xlink:actuate="onLoad"/><svg:title/><svg:desc>Show Unicode code points for UTF-8 characters</svg:desc></draw:frame><text:a xlink:href="../%0d%0c%0dhttps:/www.techtarget.com/whatis/definition/ASCII-American-Standard-Code-for-Information-Interchange" office:target-frame-name="_top" xlink:show="replace"/></text:p>
      <text:p text:style-name="P5"/>
      <text:soft-page-break/>
      <text:p text:style-name="Normal"><text:span text:style-name="T6">https://www.techtarget.com/whatis/definition/ASCII-American-Standard-Code-for-Information-Interchange</text:span></text:p>
      <text:p text:style-name="Normal"><text:a xlink:href="https://www.allbusiness.com/dictionary-ascii-american-standard-code-for-information-interchange-4943214-1.html" office:target-frame-name="_top" xlink:show="replace"><text:span text:style-name="T7">https://www.allbusiness.com/dictionary-ascii-american-standard-code-for-information-interchange-4943214-1.html</text:span></text:a></text:p>
      <text:p text:style-name="Normal"><text:a xlink:href="https://www.twilio.com/docs/glossary/what-is-unicode" office:target-frame-name="_top" xlink:show="replace"><text:span text:style-name="T8">https://www.twilio.com/docs/glossary/what-is-unicode</text:span></text:a></text:p>
      <text:p text:style-name="Normal"><text:span text:style-name="T9">https://www.datafix.com.au/BASHing/2021-09-15.htm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ris Erons</meta:initial-creator>
    <dc:creator>Chris Erons</dc:creator>
    <meta:creation-date>2026-05-14T05:40:00Z</meta:creation-date>
    <dc:date>2026-05-14T06:07:00Z</dc:date>
    <meta:template xlink:href="Normal.dotm" xlink:type="simple"/>
    <meta:editing-cycles>1</meta:editing-cycles>
    <meta:editing-duration>PT1620S</meta:editing-duration>
    <meta:document-statistic meta:page-count="3" meta:paragraph-count="2" meta:word-count="195" meta:character-count="1306" meta:row-count="9" meta:non-whitespace-character-count="1113"/>
  </office:meta>
</office:document-meta>
</file>